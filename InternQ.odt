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2e6c" officeooo:paragraph-rsid="00002e6c"/>
    </style:style>
    <style:style style:name="P2" style:family="paragraph" style:parent-style-name="Standard">
      <style:text-properties officeooo:rsid="0000a62d" officeooo:paragraph-rsid="0000a62d"/>
    </style:style>
    <style:style style:name="P3" style:family="paragraph" style:parent-style-name="Standard">
      <style:text-properties officeooo:rsid="000162f1" officeooo:paragraph-rsid="000162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he difference between merge, join, and concatenate in python is how the joining occurs in merge the data are appended horizontally adding more columns by matching keys, join also adds horizontally but it matches row indexes, concatenate glues the dataframes together along given axis.</text:p>
      <text:p text:style-name="P1"/>
      <text:p text:style-name="P2">2. inheritance is when a subclass has methods and attributes given to it by the its super class. Ex. Dog(Animal) ← here the dog is a subclass that inheritce from animal super class</text:p>
      <text:p text:style-name="P2"/>
      <text:p text:style-name="P2">3. ETL stands for extract, transform, and load. It is used in data piplines because it provides a robust framework for what is needed.</text:p>
      <text:p text:style-name="P2"/>
      <text:p text:style-name="P2">4. overfitting is when AI is tranied to much or too comples of a model so it learns the noise of training dataset but it lacks the ability to generalize and preforms not good on test data, underfitting is when model was trained to little or was not complex enough so it preforms poorly on test and training data. To not have problem of underfitting or overfitting the correct complexity of model needs to be selected and model needs to trained the correct amount of time.</text:p>
      <text:p text:style-name="P2"/>
      <text:p text:style-name="P2">5. One way to handle hallucinations from AI is by having a contextual grounding check to make sure response from AI is not hallucination</text:p>
      <text:p text:style-name="P2"/>
      <text:p text:style-name="P2">6. AI agents are AI that have access to tools and can preform tasks using the given tools, RAG stands for retrival augmented generation its used when the AI has to answer with information that is more recent than the information that it was trained with.</text:p>
      <text:p text:style-name="P2"/>
      <text:p text:style-name="P3">7. <text:s/>You have to extract the information from the given documents, I need Name, Phone number and Email. If the information is not present in the email you can leave it blan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05T12:05:37.073731700</meta:creation-date>
    <dc:date>2026-07-05T12:56:31.749325300</dc:date>
    <meta:editing-duration>PT24M1S</meta:editing-duration>
    <meta:editing-cycles>3</meta:editing-cycles>
    <meta:generator>LibreOffice/26.2.4.2$Windows_X86_64 LibreOffice_project/0229ac93fcf0d7cbc6376066c6f35021cef002dc</meta:generator>
    <meta:document-statistic meta:table-count="0" meta:image-count="0" meta:object-count="0" meta:page-count="1" meta:paragraph-count="7" meta:word-count="290" meta:character-count="1636" meta:non-whitespace-character-count="1352"/>
  </office:meta>
</office:document-meta>
</file>